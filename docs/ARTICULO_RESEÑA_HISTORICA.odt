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page-number="1"/>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fo:language="es" fo:country="ES"/>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fo:language="es" fo:country="ES"/>
    </style:style>
    <style:style style:name="T6" style:parent-style-name="Fuentedepárrafopredeter." style:family="text">
      <style:text-properties fo:font-weight="bold" style:font-weight-asian="bold"/>
    </style:style>
    <style:style style:name="P7" style:parent-style-name="Standard" style:family="paragraph">
      <style:paragraph-properties fo:text-align="justify" fo:line-height="150%"/>
    </style:style>
    <style:style style:name="P8" style:parent-style-name="Standard" style:family="paragraph">
      <style:paragraph-properties fo:text-align="justify" fo:line-height="150%"/>
    </style:style>
    <style:style style:name="P9" style:parent-style-name="Standard" style:family="paragraph">
      <style:paragraph-properties fo:text-align="justify" fo:line-height="150%"/>
    </style:style>
    <style:style style:name="P10" style:parent-style-name="Standard" style:family="paragraph">
      <style:paragraph-properties fo:text-align="justify" fo:line-height="150%"/>
    </style:style>
    <style:style style:name="P11" style:parent-style-name="Standard" style:family="paragraph">
      <style:paragraph-properties fo:text-align="justify" fo:line-height="150%"/>
    </style:style>
    <style:style style:name="T12" style:parent-style-name="Fuentedepárrafopredeter." style:family="text">
      <style:text-properties fo:language="es" fo:country="ES"/>
    </style:style>
    <style:style style:name="P13" style:parent-style-name="Standard" style:family="paragraph">
      <style:paragraph-properties fo:text-align="justify" fo:line-height="150%"/>
    </style:style>
    <style:style style:name="P14" style:parent-style-name="Standard" style:family="paragraph">
      <style:paragraph-properties fo:text-align="end" fo:line-height="150%"/>
    </style:style>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fo:language="es" fo:country="ES"/>
    </style:style>
    <style:style style:name="T18" style:parent-style-name="Fuentedepárrafopredeter." style:family="text">
      <style:text-properties fo:font-weight="bold" style:font-weight-asian="bold"/>
    </style:style>
    <style:style style:name="P19" style:parent-style-name="Standard" style:family="paragraph">
      <style:paragraph-properties fo:text-align="end" fo:line-height="150%"/>
    </style:style>
    <style:style style:name="P20" style:parent-style-name="Standard" style:family="paragraph">
      <style:paragraph-properties fo:text-align="end" fo:line-height="150%"/>
    </style:style>
    <style:style style:name="P21" style:parent-style-name="Standard" style:family="paragraph">
      <style:paragraph-properties fo:text-align="end" fo:line-height="150%"/>
    </style:style>
  </office:automatic-styles>
  <office:body>
    <office:text text:use-soft-page-breaks="true">
      <text:p text:style-name="P1">El<text:s/><text:span text:style-name="T2">Laboratorio<text:s/></text:span><text:span text:style-name="T3">de<text:s/></text:span><text:span text:style-name="T4">Hemodinamia<text:s/></text:span><text:span text:style-name="T5">del<text:s/></text:span><text:span text:style-name="T6">Hospital de Clínicas Caracas</text:span>, fue inaugurado en junio de 1987. Entre sus miembros fundadores se encuentran los Dres. Francisco Toortoledo, Irving Pena y Jose Ignacio Pulido.</text:p>
      <text:p text:style-name="P7">Desde su<text:s/>inauguración, nuestro servicio de hemodinamia ha funcionado ininterrumpidamente, manteniéndose en la vanguardia tecnológica, teniendo como fin último el mejor de los tratos para con nuestros pacientes.</text:p>
      <text:p text:style-name="P8">Fuimos el primer laboratorio de hemodinamia en adoptar<text:s/>el uso de equipos con digitalización de las imágenes obtenidas en el cateterismo cardiaco. Representamos el primer laboratorio en tener dos equipos de hemodinamia simultáneos.</text:p>
      <text:p text:style-name="P9">En el año 1989, se inició un programa de formación en hemodinamia y cardiología<text:s/>intervencionista, liderado por el Dr. Francisco Tortoledo, el cual cuenta en su aval con la formación de 13 médicos cardiólogos, hemodinamistas, quienes han cumplido una labor encomiable en el campo de la cardiología intervencionista en Venezuela.</text:p>
      <text:p text:style-name="P10">Seguimos empeñados en mejorar en función de la mejor atención para nuestros pacientes.</text:p>
      <text:p text:style-name="P11">El logro de objetivos superiores, mediante el esfuerzo continuado, teniendo como norte la búsqueda de la calidad, es lo que nos guía cada día<text:span text:style-name="T12">, al lado de tu corazón®.</text:span></text:p>
      <text:p text:style-name="P13"/>
      <text:p text:style-name="P14"><text:span text:style-name="T15">Dr. Enrique F</text:span><text:span text:style-name="T16">erm</text:span><text:span text:style-name="T17">í</text:span><text:span text:style-name="T18">n M.</text:span></text:p>
      <text:p text:style-name="P19"/>
      <text:p text:style-name="P20">Jefe del<text:s/>Servicio de Hemodinamia del Hospital de Clínicas Caracas.</text:p>
      <text:p text:style-name="P21">Julio 202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isdezerega@gmail.com</dc:creator>
    <meta:creation-date>2025-09-15T13:18:00Z</meta:creation-date>
    <dc:date>2025-09-15T13:20:00Z</dc:date>
    <meta:template xlink:href="Normal" xlink:type="simple"/>
    <meta:editing-cycles>2</meta:editing-cycles>
    <meta:editing-duration>PT120S</meta:editing-duration>
    <meta:document-statistic meta:page-count="1" meta:paragraph-count="2" meta:word-count="205" meta:character-count="1333" meta:row-count="9" meta:non-whitespace-character-count="1130"/>
  </office:meta>
</office:document-meta>
</file>